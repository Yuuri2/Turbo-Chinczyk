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 style:master-page-name="Standard">
      <style:paragraph-properties fo:line-height="115%" style:page-number="auto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List_20_Paragraph" style:list-style-name="WWNum7">
      <style:paragraph-properties fo:line-height="115%"/>
    </style:style>
    <style:style style:name="T1" style:family="text">
      <style:text-properties style:font-name-complex="F"/>
    </style:style>
    <style:style style:name="T2" style:family="text">
      <style:text-properties fo:font-size="16pt" style:font-size-asian="16pt" style:font-name-complex="F" style:font-size-complex="16pt"/>
    </style:style>
    <style:style style:name="T3" style:family="text">
      <style:text-properties fo:font-weight="bold" style:font-weight-asian="bold" style:font-name-complex="F" style:font-weight-complex="bold"/>
    </style:style>
    <style:style style:name="T4" style:family="text">
      <style:text-properties style:font-name="Aptos" style:font-name-asian="Aptos1" style:font-name-complex="Aptos1"/>
    </style:style>
    <style:style style:name="T5" style:family="text">
      <style:text-properties fo:color="#808080" fo:font-size="10pt" style:font-size-asian="10pt" style:font-name-complex="F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[--- Testy i walidacja --------------------------------------------------------------------]</text:span></text:p>
      <text:p text:style-name="P1"><text:span text:style-name="T1">1. </text:span><text:span text:style-name="T3">Strategia testów</text:span></text:p>
      <text:p text:style-name="P1"><text:span text:style-name="T3">Nowe testy będą rozpisywane po każdym commitcie na naszym repozytorium github aby uniknąć bugów w przyszłości.</text:span></text:p>
      <text:p text:style-name="P3">Poruszanie się pionków</text:p>
      <text:p text:style-name="P3">Interakcje pionków z planszą<text:line-break/>Interakcje pionków z elementami gry<text:line-break/>Sprawdzenie systemu punktów</text:p>
      <text:p text:style-name="P3">Sprawdzenie czy działa multiplayer<text:line-break/>Testy przeprowadzi kolega Jakub</text:p>
      <text:p text:style-name="P1"><text:span text:style-name="T5"/></text:p>
      <text:p text:style-name="P1"><text:span text:style-name="T1">2. </text:span><text:span text:style-name="T3">Walidacja demonstracyjna</text:span></text:p>
      <text:p text:style-name="P1"><text:span text:style-name="T5">Scenariusz pokazu:</text:span></text:p>
      <text:list xml:id="list6256145761984587965" text:style-name="WWNum7">
        <text:list-item>
          <text:p text:style-name="P4"><text:span text:style-name="T5">start,</text:span></text:p>
        </text:list-item>
        <text:list-item>
          <text:p text:style-name="P4"><text:span text:style-name="T5">główna ścieżka,</text:span></text:p>
        </text:list-item>
        <text:list-item>
          <text:p text:style-name="P4"><text:span text:style-name="T5">przypadki szczególne,</text:span></text:p>
        </text:list-item>
        <text:list-item>
          <text:p text:style-name="P4"><text:span text:style-name="T5">jak wracamy po błędzie,</text:span></text:p>
        </text:list-item>
        <text:list-item>
          <text:p text:style-name="P4"><text:span text:style-name="T5">co pokazujemy, jeśli coś pójdzie nie tak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2</meta:editing-cycles>
    <meta:creation-date>2026-04-24T09:08:00</meta:creation-date>
    <dc:date>2026-05-06T21:29:18.09</dc:date>
    <meta:editing-duration>P0D</meta:editing-duration>
    <meta:generator>OpenOffice/4.1.11$Win32 OpenOffice.org_project/4111m1$Build-9808</meta:generator>
    <meta:document-statistic meta:table-count="0" meta:image-count="0" meta:object-count="0" meta:page-count="1" meta:paragraph-count="13" meta:word-count="74" meta:character-count="5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