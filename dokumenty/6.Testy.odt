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6" style:family="paragraph" style:parent-style-name="List_20_Paragraph" style:list-style-name="WWNum7">
      <style:paragraph-properties fo:line-height="115%"/>
      <style:text-properties fo:color="#808080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--- Testy i walidacja --------------------------------------------------------------------]</text:p>
      <text:p text:style-name="P1">1. <text:span text:style-name="T1">Strategia testów</text:span></text:p>
      <text:p text:style-name="P2">Nowe ważne elementy będą testowane aby uniknąć niepożądanych sytuacji.</text:p>
      <text:p text:style-name="P2">Przykładowe funkcje które będziemy testować</text:p>
      <text:p text:style-name="P4">Poruszanie się pionków</text:p>
      <text:p text:style-name="P4">Interakcje pionków z planszą<text:line-break/>Interakcje pionków z elementami gry<text:line-break/>Sprawdzenie systemu punktów</text:p>
      <text:p text:style-name="P4">Sprawdzenie czy działa multiplayer<text:line-break/>Testy przeprowadzi kolega Jakub</text:p>
      <text:p text:style-name="P3"/>
      <text:p text:style-name="P1">2. <text:span text:style-name="T1">Walidacja demonstracyjna</text:span></text:p>
      <text:p text:style-name="P3">Scenariusz pokazu:</text:p>
      <text:list xml:id="list7080755995683856423" text:style-name="WWNum7">
        <text:list-item>
          <text:p text:style-name="P6">start,</text:p>
        </text:list-item>
        <text:list-item>
          <text:p text:style-name="P6">główna ścieżka,</text:p>
        </text:list-item>
        <text:list-item>
          <text:p text:style-name="P6">przypadki szczególne,</text:p>
        </text:list-item>
        <text:list-item>
          <text:p text:style-name="P6">jak wracamy po błędzie,</text:p>
        </text:list-item>
        <text:list-item>
          <text:p text:style-name="P6">co pokazujemy, jeśli coś pójdzie nie tak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4</meta:editing-cycles>
    <meta:creation-date>2026-04-24T09:08:00</meta:creation-date>
    <dc:date>2026-07-01T00:08:32.58</dc:date>
    <meta:editing-duration>PT2M3S</meta:editing-duration>
    <meta:generator>OpenOffice/4.1.11$Win32 OpenOffice.org_project/4111m1$Build-9808</meta:generator>
    <meta:document-statistic meta:table-count="0" meta:image-count="0" meta:object-count="0" meta:page-count="1" meta:paragraph-count="14" meta:word-count="72" meta:character-count="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