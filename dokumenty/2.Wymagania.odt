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 style:master-page-name="Standard">
      <style:paragraph-properties fo:line-height="115%" style:page-number="auto"/>
      <style:text-properties fo:font-size="16pt" style:font-size-asian="16pt" style:font-size-complex="16pt"/>
    </style:style>
    <style:style style:name="P3" style:family="paragraph" style:parent-style-name="Standard">
      <style:paragraph-properties fo:line-height="115%"/>
      <style:text-properties fo:color="#808080" fo:font-size="10pt" style:font-size-asian="10pt" style:font-size-complex="10pt"/>
    </style:style>
    <style:style style:name="P4" style:family="paragraph" style:parent-style-name="List_20_Paragraph" style:list-style-name="WWNum2">
      <style:paragraph-properties fo:line-height="115%"/>
    </style:style>
    <style:style style:name="P5" style:family="paragraph" style:parent-style-name="List_20_Paragraph" style:list-style-name="WWNum3">
      <style:paragraph-properties fo:line-height="115%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--- Wymagania --------------------------------------------------------------------------]</text:p>
      <text:p text:style-name="P1">1. <text:span text:style-name="T1">Wymagania funkcjonalne</text:span></text:p>
      <text:list xml:id="list4658170026906593653" text:style-name="WWNum2">
        <text:list-item>
          <text:p text:style-name="P4">WF-01: Webowa gra online</text:p>
          <text:list>
            <text:list-header>
              <text:p text:style-name="P4">Opis: Gra powinna być dostępna dla każdego kto posiada dostęp do internetu. Gracze będą się ze sobą łączyli w pokojach i grać między sobą. Możliwe będzie tworzenie pokoi publicznych i prywatnych na hasło</text:p>
            </text:list-header>
          </text:list>
        </text:list-item>
        <text:list-item>
          <text:p text:style-name="P4">WF-02: Podstawowe funkcje chińczyka</text:p>
          <text:list>
            <text:list-header>
              <text:p text:style-name="P4">Opis: Wdrążenie podstawy z której można budować dodatki.</text:p>
            </text:list-header>
          </text:list>
        </text:list-item>
        <text:list-item>
          <text:p text:style-name="P4">WF-03: Dodanie elementów urozmaicających grę<text:line-break/><text:tab/>Opis: Planujemy dodać elementy które zwiększą dynamikę tradycyjnej rozgrywki poprzez <text:tab/>nowe elementy gameplayowe</text:p>
        </text:list-item>
      </text:list>
      <text:p text:style-name="P3"/>
      <text:p text:style-name="P1">2. <text:span text:style-name="T1">Wymagania niefunkcjonalne</text:span></text:p>
      <text:list xml:id="list834022473295362776" text:style-name="WWNum3">
        <text:list-item>
          <text:p text:style-name="P5">Wymaganie 1. dostępność</text:p>
          <text:list>
            <text:list-header>
              <text:p text:style-name="P5">Opis: Aplikacja powinna być dostępna z poziomu przeglądarki dla każdego aby maksymalnie ułatwić dostęp dla użytkowników</text:p>
            </text:list-header>
          </text:list>
        </text:list-item>
        <text:list-item>
          <text:p text:style-name="P5">Wymaganie 2. niezawodność</text:p>
          <text:list>
            <text:list-header>
              <text:p text:style-name="P5">Opis: Chcemy uniknąć sytuacji gdzie aplikacja wysypie się pod koniec rozgrywki i przerwie użytkownikom grę bez konkluzji</text:p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4</meta:editing-cycles>
    <meta:creation-date>2026-04-24T09:05:00</meta:creation-date>
    <dc:date>2026-06-16T17:09:35.37</dc:date>
    <meta:editing-duration>PT3M5S</meta:editing-duration>
    <meta:generator>OpenOffice/4.1.11$Win32 OpenOffice.org_project/4111m1$Build-9808</meta:generator>
    <meta:document-statistic meta:table-count="0" meta:image-count="0" meta:object-count="0" meta:page-count="1" meta:paragraph-count="12" meta:word-count="125" meta:character-count="9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