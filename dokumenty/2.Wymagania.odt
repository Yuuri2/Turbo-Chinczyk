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4" style:master-page-name="MasterPage2" style:family="paragraph" style:name="P39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95">
      <style:text-properties fo:font-size="16pt" style:font-size-complex="16pt"/>
    </style:style>
    <style:style style:family="text" style:name="T96">
      <style:text-properties fo:font-size="16pt" style:font-size-complex="16pt"/>
    </style:style>
    <style:style style:parent-style-name="674" style:family="paragraph" style:name="P40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97">
      <style:text-properties fo:font-weight="bold"/>
    </style:style>
    <style:style style:parent-style-name="680" style:list-style-name="WWNum6" style:family="paragraph" style:name="P41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list-style-name="WWNum6" style:family="paragraph" style:name="P42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98">
      <style:text-properties fo:language="en" fo:country="US"/>
    </style:style>
    <style:style style:family="text" style:name="T99">
      <style:text-properties/>
    </style:style>
    <style:style style:family="text" style:name="T100">
      <style:text-properties/>
    </style:style>
    <style:style style:parent-style-name="680" style:list-style-name="WWNum6" style:family="paragraph" style:name="P43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list-style-name="WWNum6" style:family="paragraph" style:name="P44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parent-style-name="680" style:list-style-name="WWNum6" style:family="paragraph" style:name="P45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list-style-name="WWNum6" style:family="paragraph" style:name="P46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04">
      <style:text-properties fo:language="en" fo:country="US"/>
    </style:style>
    <style:style style:parent-style-name="680" style:list-style-name="WWNum6" style:family="paragraph" style:name="P47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05">
      <style:text-properties/>
    </style:style>
    <style:style style:family="text" style:name="T106">
      <style:text-properties fo:language="en" fo:country="US"/>
    </style:style>
    <style:style style:family="text" style:name="T107">
      <style:text-properties/>
    </style:style>
    <style:style style:family="text" style:name="T108">
      <style:text-properties/>
    </style:style>
    <style:style style:parent-style-name="680" style:list-style-name="WWNum6" style:family="paragraph" style:name="P48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list-style-name="WWNum6" style:family="paragraph" style:name="P49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09">
      <style:text-properties fo:language="en" fo:country="US"/>
    </style:style>
    <style:style style:family="text" style:name="T110">
      <style:text-properties fo:language="en" fo:country="US"/>
    </style:style>
    <style:style style:family="text" style:name="T111">
      <style:text-properties fo:language="en" fo:country="US"/>
    </style:style>
    <style:style style:parent-style-name="680" style:list-style-name="WWNum6" style:family="paragraph" style:name="P50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12">
      <style:text-properties fo:language="en" fo:country="US"/>
    </style:style>
    <style:style style:family="text" style:name="T113">
      <style:text-properties fo:language="en" fo:country="US"/>
    </style:style>
    <style:style style:parent-style-name="674" style:family="paragraph" style:name="P51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family="text" style:name="T114">
      <style:text-properties fo:font-weight="bold"/>
    </style:style>
    <style:style style:parent-style-name="680" style:list-style-name="WWNum3" style:family="paragraph" style:name="P52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family="paragraph" style:name="P53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list-style-name="WWNum3" style:family="paragraph" style:name="P54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80" style:family="paragraph" style:name="P55">
      <style:paragraph-properties fo:line-height="115%"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  <style:style style:parent-style-name="674" style:family="paragraph" style:name="P56">
      <style:paragraph-properties/>
      <style:text-properties fo:color="#000000" fo:font-family="Calibri" style:font-family-asian="SimSun" style:font-family-complex="Tahoma" fo:font-size="12pt" style:font-size-complex="12pt" fo:language="pl" style:language-complex="ar" fo:country="PL" style:country-complex="SA"/>
    </style:style>
  </office:automatic-styles>
  <office:body>
    <office:text text:use-soft-page-breaks="true">
      <text:p text:style-name="P39"><text:span text:style-name="T95">[--- Wymagania --------------------------------------------------------------------------]</text:span><text:span text:style-name="T96"/></text:p>
      <text:p text:style-name="P40"><text:span>1. </text:span><text:span text:style-name="T97">Wymagania funkcjonalne</text:span><text:span/></text:p>
      <text:list text:style-name="WWNum6" text:continue-numbering="true">
        <text:list-item>
          <text:p text:style-name="P41"><text:span>łączenie się do aplikacji przez przeglądarkę</text:span><text:span/></text:p>
        </text:list-item>
        <text:list-item>
          <text:p text:style-name="P42"><text:span text:style-name="T98">Aplikacja responsywna</text:span><text:span text:style-name="T99"/><text:span text:style-name="T100"/></text:p>
        </text:list-item>
        <text:list-item>
          <text:p text:style-name="P43"><text:span>logowanie</text:span><text:span/></text:p>
        </text:list-item>
        <text:list-item>
          <text:p text:style-name="P44"><text:span>rejestrowanie</text:span><text:span/><text:span text:style-name="T101"/><text:span text:style-name="T102"/><text:span text:style-name="T103"/><text:span/></text:p>
        </text:list-item>
        <text:list-item>
          <text:p text:style-name="P45"><text:span>wyszukiwarka pokoi</text:span><text:span/></text:p>
        </text:list-item>
        <text:list-item>
          <text:p text:style-name="P46"><text:span>pokoj</text:span><text:span text:style-name="T104">e</text:span><text:span> publiczne</text:span><text:span/></text:p>
        </text:list-item>
        <text:list-item>
          <text:p text:style-name="P47"><text:span text:style-name="T105"/><text:span text:style-name="T106">Pokoje prywatne wymagające hasła</text:span><text:span text:style-name="T107"/><text:span text:style-name="T108"/></text:p>
        </text:list-item>
        <text:list-item>
          <text:p text:style-name="P48"><text:span>rozszerzona gra w chińczyka</text:span><text:span/></text:p>
        </text:list-item>
        <text:list-item>
          <text:p text:style-name="P49"><text:span text:style-name="T109">W razie rozłączenia możliwość dołączenia</text:span><text:span/><text:span text:style-name="T110"/><text:span text:style-name="T111"/><text:span/></text:p>
        </text:list-item>
        <text:list-item>
          <text:p text:style-name="P50"><text:span text:style-name="T112">Globalny ranking</text:span><text:span text:style-name="T113"/></text:p>
        </text:list-item>
      </text:list>
      <text:p text:style-name="P51"><text:span>2. </text:span><text:span text:style-name="T114">Wymagania niefunkcjonalne</text:span><text:span/></text:p>
      <text:list text:style-name="WWNum3" text:continue-numbering="true">
        <text:list-item>
          <text:p text:style-name="P52"><text:span>Wymaganie 1. dostępność</text:span><text:span/></text:p>
        </text:list-item>
      </text:list>
      <text:p text:style-name="P53"><text:span>Opis: Aplikacja powinna być dostępna z poziomu przeglądarki dla każdego aby maksymalnie ułatwić dostęp dla użytkowników</text:span><text:span/></text:p>
      <text:list text:style-name="WWNum3" text:continue-numbering="true">
        <text:list-item>
          <text:p text:style-name="P54"><text:span>Wymaganie 2. niezawodność</text:span><text:span/></text:p>
        </text:list-item>
      </text:list>
      <text:p text:style-name="P55"><text:span>Opis: Chcemy uniknąć sytuacji gdzie aplikacja wysypie się pod koniec rozgrywki i przerwie użytkownikom grę bez konkluzji</text:span><text:span/></text:p>
      <text:p text:style-name="P5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00%" style:tab-stop-distance="35.4pt" fo:margin-top="0pt"/>
      <style:text-properties fo:font-size="10pt" fo:language="pl" style:language-complex="ar" fo:country="PL" style:country-complex="SA"/>
    </style:default-style>
    <style:default-style style:family="text">
      <style:text-properties fo:language="pl" style:language-complex="ar" fo:country="PL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 fo:line-height="100%" fo:margin-top="0pt"/>
    </style:style>
    <style:style style:parent-style-name="138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81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681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681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681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681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681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681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681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81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681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681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681" style:display-name="Quote Char" style:family="text" style:name="164">
      <style:paragraph-properties/>
      <style:text-properties fo:color="#404040" fo:font-style="italic"/>
    </style:style>
    <style:style style:parent-style-name="681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681" style:display-name="Intense Quote Char" style:family="text" style:name="168">
      <style:paragraph-properties/>
      <style:text-properties fo:color="#0f4761" fo:font-style="italic"/>
    </style:style>
    <style:style style:parent-style-name="681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681" style:display-name="Subtle Emphasis" style:family="text" style:name="171">
      <style:paragraph-properties/>
      <style:text-properties fo:color="#404040" fo:font-style="italic"/>
    </style:style>
    <style:style style:parent-style-name="681" style:display-name="Emphasis" style:family="text" style:name="172">
      <style:paragraph-properties/>
      <style:text-properties fo:font-style="italic"/>
    </style:style>
    <style:style style:parent-style-name="681" style:display-name="Strong" style:family="text" style:name="173">
      <style:paragraph-properties/>
      <style:text-properties fo:font-weight="bold"/>
    </style:style>
    <style:style style:parent-style-name="681" style:display-name="Subtle Reference" style:family="text" style:name="174">
      <style:paragraph-properties/>
      <style:text-properties fo:font-variant="small-caps" fo:color="#5a5a5a"/>
    </style:style>
    <style:style style:parent-style-name="681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1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1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681" style:display-name="Footnote Text Char" style:family="text" style:name="182">
      <style:paragraph-properties/>
      <style:text-properties fo:font-size="10pt" style:font-size-complex="10pt"/>
    </style:style>
    <style:style style:parent-style-name="681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681" style:display-name="Endnote Text Char" style:family="text" style:name="185">
      <style:paragraph-properties/>
      <style:text-properties fo:font-size="10pt" style:font-size-complex="10pt"/>
    </style:style>
    <style:style style:parent-style-name="681" style:display-name="endnote reference" style:family="text" style:name="186">
      <style:paragraph-properties/>
      <style:text-properties style:text-position="super 58%"/>
    </style:style>
    <style:style style:parent-style-name="681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1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681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73">
      <style:paragraph-properties fo:line-height="107.083%" fo:margin-top="0pt" fo:margin-bottom="8pt"/>
      <style:text-properties fo:color="#000000" fo:font-family="Calibri" style:font-family-asian="SimSun" style:font-family-complex="Tahoma" fo:font-size="11pt" style:font-size-complex="11pt" fo:language="pl" style:language-complex="ar" fo:country="PL" style:country-complex="SA"/>
    </style:style>
    <style:style style:parent-style-name="673" style:display-name="Standard" style:family="paragraph" style:name="674">
      <style:paragraph-properties fo:line-height="115.833%"/>
      <style:text-properties fo:color="#000000" fo:font-size="12pt" style:font-size-complex="12pt"/>
    </style:style>
    <style:style style:parent-style-name="674" style:display-name="Heading" style:family="paragraph" style:name="675">
      <style:paragraph-properties fo:margin-top="12pt" fo:margin-bottom="6pt"/>
      <style:text-properties fo:font-family="Arial" style:font-family-asian="Microsoft YaHei" style:font-family-complex="Arial" fo:font-size="14pt" style:font-size-complex="14pt"/>
    </style:style>
    <style:style style:parent-style-name="674" style:display-name="Text body" style:family="paragraph" style:name="676">
      <style:paragraph-properties fo:margin-top="0pt" fo:margin-bottom="6pt"/>
    </style:style>
    <style:style style:parent-style-name="676" style:display-name="List" style:family="paragraph" style:name="677">
      <style:paragraph-properties/>
      <style:text-properties style:font-family-complex="Arial"/>
    </style:style>
    <style:style style:parent-style-name="674" style:display-name="Caption" style:family="paragraph" style:name="678">
      <style:paragraph-properties fo:margin-top="6pt" fo:margin-bottom="6pt"/>
      <style:text-properties style:font-family-complex="Arial" fo:font-size="12pt" style:font-size-complex="12pt" fo:font-style="italic"/>
    </style:style>
    <style:style style:parent-style-name="674" style:display-name="Index" style:family="paragraph" style:name="679">
      <style:paragraph-properties/>
      <style:text-properties style:font-family-complex="Arial"/>
    </style:style>
    <style:style style:parent-style-name="674" style:display-name="List Paragraph" style:family="paragraph" style:name="680">
      <style:paragraph-properties fo:margin-left="1.27cm" fo:margin-right="0cm" fo:text-indent="0cm"/>
      <style:text-properties/>
    </style:style>
    <style:style style:parent-style-name="673" style:class="default" style:display-name="Default Paragraph Font" style:family="text" style:name="681">
      <style:paragraph-properties fo:line-height="100%" fo:margin-top="0pt"/>
    </style:style>
    <style:style style:family="text" style:name="T1">
      <style:text-properties fo:font-family="Wingdings" style:font-family-asian="Wingdings" style:font-family-complex="Wingdings"/>
    </style:style>
    <style:style style:family="text" style:name="T2">
      <style:text-properties fo:font-family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/>
    </style:style>
    <style:style style:family="text" style:name="T11">
      <style:text-properties fo:font-family="Wingdings" style:font-family-asian="Wingdings" style:font-family-complex="Wingdings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Wingdings" style:font-family-asian="Wingdings" style:font-family-complex="Wingdings"/>
    </style:style>
    <style:style style:family="text" style:name="T14">
      <style:text-properties fo:font-family="Wingdings" style:font-family-asian="Wingdings" style:font-family-complex="Wingdings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Wingdings" style:font-family-asian="Wingdings" style:font-family-complex="Wingdings"/>
    </style:style>
    <style:style style:family="text" style:name="T17">
      <style:text-properties fo:font-family="Wingdings" style:font-family-asian="Wingdings" style:font-family-complex="Wingdings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Wingdings" style:font-family-asian="Wingdings" style:font-family-complex="Wingdings"/>
    </style:style>
    <style:style style:family="text" style:name="T20">
      <style:text-properties fo:font-family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Wingdings" style:font-family-asian="Wingdings" style:font-family-complex="Wingdings"/>
    </style:style>
    <style:style style:family="text" style:name="T29">
      <style:text-properties fo:font-family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text:list-style style:name="WWNum1">
      <text:list-level-style-bullet text:level="1" text:style-name="T1" text:bullet-char="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number text:level="1" text:style-name="T10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bullet text:level="2" text:style-name="T11" text:bullet-char="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Wingdings" style:font-family-asian="Wingdings" style:font-family-complex="Wingdings"/>
      </text:list-level-style-bullet>
      <text:list-level-style-bullet text:level="3" text:style-name="T12" text:bullet-char="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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Wingdings" style:font-family-asian="Wingdings" style:font-family-complex="Wingdings"/>
      </text:list-level-style-bullet>
      <text:list-level-style-bullet text:level="5" text:style-name="T14" text:bullet-char="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Wingdings" style:font-family-asian="Wingdings" style:font-family-complex="Wingdings"/>
      </text:list-level-style-bullet>
      <text:list-level-style-bullet text:level="6" text:style-name="T15" text:bullet-char="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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Wingdings" style:font-family-asian="Wingdings" style:font-family-complex="Wingdings"/>
      </text:list-level-style-bullet>
      <text:list-level-style-bullet text:level="8" text:style-name="T17" text:bullet-char="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Wingdings" style:font-family-asian="Wingdings" style:font-family-complex="Wingdings"/>
      </text:list-level-style-bullet>
      <text:list-level-style-bullet text:level="9" text:style-name="T18" text:bullet-char="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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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9" text:bullet-char="▫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38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9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0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41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42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43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44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45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  <text:list-style style:name="WWNum6">
      <text:list-level-style-number text:level="1" text:style-name="T46" style:num-format="A" style:num-letter-sync="true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7">
      <text:list-level-style-number text:level="1" text:style-name="T55" style:num-format="A" style:num-letter-sync="true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0.129</meta:generator>
    <meta:creation-date>2026-04-24T07:05:00Z</meta:creation-date>
    <meta:user-defined meta:name="AppVersion" meta:value-type="string">16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