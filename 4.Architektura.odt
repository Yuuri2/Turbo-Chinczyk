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OpenSymbol" svg:font-family="OpenSymbol"/>
    <style:font-face style:name="gg sans" svg:font-family="'gg sans', 'Noto Sans', 'Helvetica Neue', Helvetica, Arial, sans-serif"/>
    <style:font-face style:name="inherit" svg:font-family="inherit"/>
    <style:font-face style:name="Arial2" svg:font-family="Arial" style:font-family-generic="swiss"/>
    <style:font-face style:name="Segoe UI" svg:font-family="'Segoe UI'" style:font-family-generic="swiss"/>
    <style:font-face style:name="Courier New" svg:font-family="'Courier New'" style:font-adornments="Normalny" style:font-family-generic="modern" style:font-pitch="fixed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color="#000000" fo:font-size="13pt" style:font-size-asian="13pt" style:font-size-complex="13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 style:master-page-name="Standard">
      <style:paragraph-properties fo:line-height="115%" style:page-number="auto"/>
      <style:text-properties fo:font-size="13pt" style:font-size-asian="13pt" style:font-size-complex="13pt"/>
    </style:style>
    <style:style style:name="P4" style:family="paragraph" style:parent-style-name="List_20_Paragraph" style:list-style-name="WWNum6">
      <style:paragraph-properties fo:line-height="115%"/>
      <style:text-properties fo:color="#000000" fo:font-size="13pt" style:font-size-asian="13pt" style:font-size-complex="13pt"/>
    </style:style>
    <style:style style:name="P5" style:family="paragraph" style:parent-style-name="List_20_Paragraph">
      <style:paragraph-properties fo:line-height="115%"/>
      <style:text-properties fo:font-size="13pt" style:font-size-asian="13pt" style:font-size-complex="13pt"/>
    </style:style>
    <style:style style:name="P6" style:family="paragraph" style:parent-style-name="List_20_Paragraph" style:list-style-name="WWNum6">
      <style:paragraph-properties fo:line-height="115%"/>
      <style:text-properties fo:font-size="13pt" style:font-size-asian="13pt" style:font-size-complex="13pt"/>
    </style:style>
    <style:style style:name="P7" style:family="paragraph" style:parent-style-name="List_20_Paragraph" style:list-style-name="L7">
      <style:paragraph-properties fo:line-height="115%"/>
      <style:text-properties fo:font-size="13pt" style:font-size-asian="13pt" style:font-size-complex="13pt"/>
    </style:style>
    <style:style style:name="P8" style:family="paragraph" style:parent-style-name="List_20_Paragraph" style:list-style-name="WWNum6">
      <style:paragraph-properties fo:margin-left="0cm" fo:margin-right="0cm" fo:line-height="115%" fo:text-indent="0cm" style:auto-text-indent="false"/>
      <style:text-properties fo:font-size="13pt" style:font-size-asian="13pt" style:font-size-complex="13pt"/>
    </style:style>
    <style:style style:name="T1" style:family="text">
      <style:text-properties style:font-name-complex="F"/>
    </style:style>
    <style:style style:name="T2" style:family="text">
      <style:text-properties fo:font-size="16pt" style:font-size-asian="16pt" style:font-name-complex="F" style:font-size-complex="16pt"/>
    </style:style>
    <style:style style:name="T3" style:family="text">
      <style:text-properties style:font-name="Aptos" style:font-name-asian="Aptos1" style:font-name-complex="Aptos1"/>
    </style:style>
    <style:style style:name="T4" style:family="text">
      <style:text-properties fo:color="#808080"/>
    </style:style>
    <style:style style:name="T5" style:family="text">
      <style:text-properties fo:color="#808080" style:font-name-complex="F"/>
    </style:style>
    <style:style style:name="T6" style:family="text">
      <style:text-properties fo:color="#808080" fo:font-size="10pt" style:font-size-asian="10pt" style:font-name-complex="F" style:font-size-complex="10pt"/>
    </style:style>
    <style:style style:name="T7" style:family="text">
      <style:text-properties fo:color="#808080" fo:font-size="10pt" style:font-size-asian="10pt" style:font-size-complex="10pt"/>
    </style:style>
    <style:style style:name="T8" style:family="text">
      <style:text-properties fo:color="#808080" style:font-name="Aptos" style:font-name-asian="Aptos1" style:font-name-complex="Aptos1"/>
    </style:style>
    <style:style style:name="T9" style:family="text">
      <style:text-properties fo:color="#808080" style:font-name="Aptos" fo:font-size="10pt" style:font-name-asian="Aptos1" style:font-size-asian="10pt" style:font-name-complex="Aptos1" style:font-size-complex="10pt"/>
    </style:style>
    <style:style style:name="T10" style:family="text">
      <style:text-properties fo:color="#ff0000" style:font-name-complex="F"/>
    </style:style>
    <style:style style:name="T11" style:family="text">
      <style:text-properties fo:color="#ff0000" fo:font-size="10pt" style:font-size-asian="10pt" style:font-name-complex="F" style:font-size-complex="10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[--- Architektura i rozwiązanie --------------------------------------------------------]</text:span></text:p>
      <text:p text:style-name="P1"><text:span text:style-name="T1">Wybrane, przykładowe </text:span><text:span text:style-name="T3">podsekcje</text:span><text:span text:style-name="T1">, które można umieścić w niniejszej sekcji:</text:span></text:p>
      <text:list xml:id="list8210369566757414144" text:style-name="WWNum6">
        <text:list-item>
          <text:p text:style-name="P4"><text:span text:style-name="T1">koncepcje rozwiązania (opis na poziomie wysokim);</text:span></text:p>
          <text:p text:style-name="P4"><text:span text:style-name="T1">Turowa gra będąca rozszerzeniem klasycznego chińczyka o nowe mechaniki i systemy urozmaicające grę. Aplikację chcemy wdrążyć jako serwis webowy, gdzie do poczekalni dołączać będzie się kodem i gra będzie możliwa w przeglądarce z poziomu smartphona. Po dołączeniu gra się rozpoczyna i każdy gracz ma fazę ruchu i fazę zakupów. W fazie zakupów może wykorzystać zebrane punkty na różne ulepszenia. Gra kończy się gdy jeden z graczy przeprowadzi do bazy wszystkie swoje pionki.</text:span></text:p>
        </text:list-item>
        <text:list-item>
          <text:p text:style-name="P4"><text:span text:style-name="T1">architektura logiczna (moduły, </text:span>odpowiedzialności<text:span text:style-name="T1"> modułów, granice odpowiedzialności, zależności);</text:span></text:p>
          <text:p text:style-name="P6">Moduły: Gameplay, Points/Skills, Realtime Multiplayer, UI</text:p>
          <text:p text:style-name="P6">Gameplay - backend, logiczna strona aplikacji oraz główny silnik gry</text:p>
          <text:p text:style-name="P6">Points/Skills - logika związana z punktami, ich użyciem, zdobywaniem</text:p>
          <text:p text:style-name="P6">Multiplayer - pokoje, dołączanie/opuszczanie, synchronizacja stanu</text:p>
          <text:p text:style-name="P6">UI – UI</text:p>
        </text:list-item>
      </text:list>
      <text:p text:style-name="P5"/>
      <text:p text:style-name="P5">Gameplay -&gt; Points <text:s text:c="3"/>Po wykonanej akcji gracz zdobywa punktu</text:p>
      <text:p text:style-name="P5">UI -&gt; Points <text:s text:c="7"/>Wyświetla ilość punktów i możliwych umiejętności do zakupienia przez nie</text:p>
      <text:p text:style-name="P5">Multiplayer -&gt; <text:s text:c="3"/>Gameplay <text:s text:c="4"/>Widzi zmiane stanu pionka/planszy i musi przesłać do całości pokoju</text:p>
      <text:p text:style-name="P5"/>
      <text:p text:style-name="P5">Granice</text:p>
      <text:p text:style-name="P5">Gameplay | UI <text:s text:c="8"/>UI nie zmienia się w zależności od logiki gry</text:p>
      <text:p text:style-name="P5">Points | UI <text:s text:c="7"/>UI wyświetla tylko ile posiada punktów, wystarczająco czy za mało</text:p>
      <text:list xml:id="list41623975" text:continue-numbering="true" text:style-name="WWNum6">
        <text:list-item>
          <text:p text:style-name="P4"><text:span text:style-name="T1">architektura techniczna (języki, frameworki, biblioteki, urządzenia, platformy, integracje);</text:span></text:p>
        </text:list-item>
      </text:list>
      <text:list xml:id="list3802559968477624982" text:style-name="L7">
        <text:list-item>
          <text:p text:style-name="P7">języki:</text:p>
          <text:p text:style-name="P7">-javascript / typescript</text:p>
        </text:list-item>
        <text:list-item>
          <text:p text:style-name="P7">frameworki:</text:p>
          <text:p text:style-name="P7">-Sveltekit</text:p>
        </text:list-item>
        <text:list-item>
          <text:p text:style-name="P7">biblioteki:</text:p>
          <text:p text:style-name="P7"><text:soft-page-break/>-work in progress</text:p>
        </text:list-item>
        <text:list-item>
          <text:p text:style-name="P7">urządzenia:</text:p>
          <text:p text:style-name="P7">-telefony komórkowe</text:p>
          <text:p text:style-name="P7">-komputery</text:p>
        </text:list-item>
        <text:list-item>
          <text:p text:style-name="P7">platformy:</text:p>
          <text:p text:style-name="P7">-linux</text:p>
        </text:list-item>
        <text:list-item>
          <text:p text:style-name="P7">integracje:</text:p>
          <text:p text:style-name="P7">-github actions</text:p>
        </text:list-item>
      </text:list>
      <text:list xml:id="list41615432" text:continue-list="list41623975" text:style-name="WWNum6">
        <text:list-header>
          <text:p text:style-name="P8"><text:span text:style-name="T5"/></text:p>
          <text:p text:style-name="P6"><text:span text:style-name="T10"/></text:p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OpenSymbol" svg:font-family="OpenSymbol"/>
    <style:font-face style:name="gg sans" svg:font-family="'gg sans', 'Noto Sans', 'Helvetica Neue', Helvetica, Arial, sans-serif"/>
    <style:font-face style:name="inherit" svg:font-family="inherit"/>
    <style:font-face style:name="Arial2" svg:font-family="Arial" style:font-family-generic="swiss"/>
    <style:font-face style:name="Segoe UI" svg:font-family="'Segoe UI'" style:font-family-generic="swiss"/>
    <style:font-face style:name="Courier New" svg:font-family="'Courier New'" style:font-adornments="Normalny" style:font-family-generic="modern" style:font-pitch="fixed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16%"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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" text:bullet-char="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" text:bullet-char="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style:num-suffix="" text:bullet-char="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style:num-suffix="" text:bullet-char="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▫" text:bullet-char="▫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B</meta:initial-creator>
    <meta:editing-cycles>2</meta:editing-cycles>
    <meta:creation-date>2026-04-24T09:07:00</meta:creation-date>
    <dc:date>2026-05-06T21:34:40.53</dc:date>
    <meta:editing-duration>P0D</meta:editing-duration>
    <meta:generator>OpenOffice/4.1.11$Win32 OpenOffice.org_project/4111m1$Build-9808</meta:generator>
    <meta:document-statistic meta:table-count="0" meta:image-count="0" meta:object-count="0" meta:page-count="2" meta:paragraph-count="30" meta:word-count="238" meta:character-count="17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