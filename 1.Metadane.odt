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 svg:font-family="'Courier New'" style:font-adornments="Normalny" style:font-family-generic="modern" style:font-pitch="fixed"/>
    <style:font-face style:name="Aptos" svg:font-family="Aptos" style:font-family-generic="roman" style:font-pitch="variable"/>
    <style:font-face style:name="Calibri" svg:font-family="Calibri" style:font-family-generic="roman" style:font-pitch="variable"/>
    <style:font-face style:name="Arial" svg:font-family="Arial" style:font-family-generic="swiss" style:font-pitch="variable"/>
    <style:font-face style:name="Aptos1" svg:font-family="Aptos"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List_20_Paragraph" style:list-style-name="WWNum1">
      <style:paragraph-properties fo:line-height="115%"/>
    </style:style>
    <style:style style:name="P3" style:family="paragraph" style:parent-style-name="List_20_Paragraph" style:list-style-name="L1">
      <style:paragraph-properties fo:line-height="115%"/>
      <style:text-properties fo:color="#000000" fo:font-size="10pt" style:font-size-asian="10pt" style:font-size-complex="10pt"/>
    </style:style>
    <style:style style:name="P4" style:family="paragraph" style:parent-style-name="Standard" style:master-page-name="Standard">
      <style:paragraph-properties fo:line-height="115%" style:page-number="auto"/>
      <style:text-properties fo:font-size="16pt" style:font-size-asian="16pt" style:font-size-complex="16pt"/>
    </style:style>
    <style:style style:name="T1" style:family="text">
      <style:text-properties style:font-name="Aptos" style:font-name-asian="Aptos1" style:font-name-complex="Aptos1"/>
    </style:style>
    <style:style style:name="T2" style:family="text">
      <style:text-properties fo:color="#808080"/>
    </style:style>
    <style:style style:name="T3"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Metadane -----------------------------------------------------------------------------]</text:p>
      <text:list xml:id="list3002875373099327910" text:style-name="WWNum1">
        <text:list-item>
          <text:p text:style-name="P2">Nazwa projektu: Turbo Chińczyk</text:p>
        </text:list-item>
        <text:list-item>
          <text:p text:style-name="P2">Zespół: Adrian Torbus, Dawid Pytel, Jakub Wieliński</text:p>
        </text:list-item>
        <text:list-item>
          <text:p text:style-name="P2">Właściciel <text:span text:style-name="T1">produktu</text:span>: <text:span text:style-name="T2">Arkadiusz Nowakowski</text:span></text:p>
        </text:list-item>
        <text:list-item>
          <text:p text:style-name="P2">Repozytorium / lokalizacja artefaktów: <text:a xlink:type="simple" xlink:href="https://github.com/Yuuri2/Turbo-Chinczyk" text:style-name="Internet_20_link" text:visited-style-name="Visited_20_Internet_20_Link"><text:span text:style-name="T3">github</text:span></text:a></text:p>
        </text:list-item>
        <text:list-item>
          <text:p text:style-name="P2">Wersja dokumentu: 1.0</text:p>
        </text:list-item>
        <text:list-item>
          <text:p text:style-name="P2">Data utworzenia: <text:span text:style-name="T2">26.03.2026 r.</text:span></text:p>
        </text:list-item>
        <text:list-item>
          <text:p text:style-name="P2">Status projektu: pomysł (wymyślić listę)</text:p>
        </text:list-item>
      </text:list>
      <text:list xml:id="list8759497824377703313" text:style-name="L1">
        <text:list-item>
          <text:p text:style-name="P3">Plan teoretyczny</text:p>
        </text:list-item>
        <text:list-item>
          <text:p text:style-name="P3">Działający prototyp (bare-minimum)</text:p>
        </text:list-item>
        <text:list-item>
          <text:p text:style-name="P3">Dodanie naszych pomysłów</text:p>
        </text:list-item>
        <text:list-item>
          <text:p text:style-name="P3">Wdrążenie online</text:p>
        </text:list-item>
        <text:list-item>
          <text:p text:style-name="P3">Faza testów</text:p>
        </text:list-item>
        <text:list-item>
          <text:p text:style-name="P3">Zakończenie projektu – gotowy produkt</text:p>
        </text:list-item>
      </text:list>
      <text:p text:style-name="P1">Jednozdaniowy opis:</text:p>
      <text:p text:style-name="P1">Projekt zakłada stworzenie aplikacji internetowej, gdzie użytkownicy będą mogli się ze sobą łączyć aby zagrać ze sobą grę. Gracze będą mogli łączyć się ze sobą za pomocy kodu, poprzez który będą mogli wejść do poczekalni. Gra planowo ma mieć wszystkie funkcjonalności zwykłego chińczyka, które zostaną rozszerzone o elementy urozmaicające rozgrywkę. Te specjalne akcje będzie można wykonywać za pomocą punktów które gracz będzie zbierać</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 svg:font-family="'Courier New'" style:font-adornments="Normalny" style:font-family-generic="modern" style:font-pitch="fixed"/>
    <style:font-face style:name="Aptos" svg:font-family="Aptos" style:font-family-generic="roman" style:font-pitch="variable"/>
    <style:font-face style:name="Calibri" svg:font-family="Calibri" style:font-family-generic="roman" style:font-pitch="variable"/>
    <style:font-face style:name="Arial" svg:font-family="Arial" style:font-family-generic="swiss" style:font-pitch="variable"/>
    <style:font-face style:name="Aptos1" svg:font-family="Aptos"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pl" fo:country="P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6%"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B</meta:initial-creator>
    <meta:editing-cycles>3</meta:editing-cycles>
    <meta:creation-date>2026-04-24T09:04:00</meta:creation-date>
    <dc:date>2026-06-16T17:05:36.81</dc:date>
    <meta:editing-duration>PT8M51S</meta:editing-duration>
    <meta:generator>OpenOffice/4.1.11$Win32 OpenOffice.org_project/4111m1$Build-9808</meta:generator>
    <meta:document-statistic meta:table-count="0" meta:image-count="0" meta:object-count="0" meta:page-count="1" meta:paragraph-count="16" meta:word-count="131" meta:character-count="9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